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C0000014940F2030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02cm" svg:x="1cm" svg:y="7.864cm" presentation:class="title" presentation:user-transformed="true">
          <draw:text-box>
            <text:p>Trabalho Arrays e Matrizes - Ordenação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Grupo: Matheus Vaz, Maurício Vaz, Nicholas Sica, Mailane Dia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rdenação – Bubble Sort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omo funciona?</text:p>
                <text:p><text:span text:style-name="T1">A ordenação do tipo Bubble Sort consiste em ordenar um vetor do menor para o maior, para isso é feito uma validação para saber se o valor que está sendo verificado no array é maior do que o próximo valor do array, nesse caso é realizado a substituição dos valores no array</text:span></text:p>
              </text:list-item>
            </text:list>
          </draw:text-box>
        </draw:frame>
        <draw:frame draw:style-name="gr2" draw:text-style-name="P2" draw:layer="layout" svg:width="3cm" svg:height="5.739cm" svg:x="19cm" svg:y="8.261cm">
          <draw:image xlink:href="Pictures/10000000000000AC0000014940F203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6-19T21:09:56.871000000</meta:creation-date>
    <meta:editing-duration>PT8M22S</meta:editing-duration>
    <meta:editing-cycles>2</meta:editing-cycles>
    <meta:generator>LibreOffice/24.2.2.2$Windows_X86_64 LibreOffice_project/d56cc158d8a96260b836f100ef4b4ef25d6f1a01</meta:generator>
    <dc:title>Midnightblue</dc:title>
    <dc:date>2026-06-19T21:18:19.114000000</dc:date>
    <meta:document-statistic meta:object-count="59"/>
  </office:meta>
</office:document-meta>
</file>